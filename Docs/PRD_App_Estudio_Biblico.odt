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AC000000FFC489F9F6.png"/>
  <manifest:file-entry manifest:media-type="image/png" manifest:full-path="Pictures/10000201000000B1000000EB73A6E865.png"/>
  <manifest:file-entry manifest:media-type="image/png" manifest:full-path="Pictures/10000201000000AE00000100F60CAB0E.png"/>
  <manifest:file-entry manifest:media-type="image/png" manifest:full-path="Pictures/10000201000000B1000000E9D94CB7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" svg:font-family="Arial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5.921cm" fo:margin-left="-0.191cm" fo:margin-top="0cm" fo:margin-bottom="0cm" table:align="left"/>
    </style:style>
    <style:style style:name="Tabla1.A" style:family="table-column">
      <style:table-column-properties style:column-width="4.937cm"/>
    </style:style>
    <style:style style:name="Tabla1.B" style:family="table-column">
      <style:table-column-properties style:column-width="10.98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1f3864" fo:padding-left="0.191cm" fo:padding-right="0.191cm" fo:padding-top="0cm" fo:padding-bottom="0cm" fo:border="0.002cm solid #cccccc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0.002cm solid #cccccc">
        <style:background-image/>
      </style:table-cell-properties>
    </style:style>
    <style:style style:name="Tabla1.B3" style:family="table-cell" style:data-style-name="N37">
      <style:table-cell-properties fo:background-color="#ffffff" fo:padding-left="0.191cm" fo:padding-right="0.191cm" fo:padding-top="0cm" fo:padding-bottom="0cm" fo:border="0.002cm solid #cccccc">
        <style:background-image/>
      </style:table-cell-properties>
    </style:style>
    <style:style style:name="Tabla2" style:family="table">
      <style:table-properties style:width="15.921cm" fo:margin-left="-0.191cm" fo:margin-top="0cm" fo:margin-bottom="0cm" table:align="left"/>
    </style:style>
    <style:style style:name="Tabla2.A" style:family="table-column">
      <style:table-column-properties style:column-width="3.173cm"/>
    </style:style>
    <style:style style:name="Tabla2.B" style:family="table-column">
      <style:table-column-properties style:column-width="6.371cm"/>
    </style:style>
    <style:style style:name="Tabla2.C" style:family="table-column">
      <style:table-column-properties style:column-width="3.175cm"/>
    </style:style>
    <style:style style:name="Tabla2.D" style:family="table-column">
      <style:table-column-properties style:column-width="3.20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dddddd" fo:padding-left="0.191cm" fo:padding-right="0.191cm" fo:padding-top="0cm" fo:padding-bottom="0cm" fo:border="0.002cm solid #cccccc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="0.002cm solid #cccccc">
        <style:background-image/>
      </style:table-cell-properties>
    </style:style>
    <style:style style:name="Tabla3" style:family="table">
      <style:table-properties style:width="15.921cm" table:align="margins"/>
    </style:style>
    <style:style style:name="Tabla3.A" style:family="table-column">
      <style:table-column-properties style:column-width="7.96cm" style:rel-column-width="32767*"/>
    </style:style>
    <style:style style:name="Tabla3.B" style:family="table-column">
      <style:table-column-properties style:column-width="7.96cm" style:rel-column-width="32768*"/>
    </style:style>
    <style:style style:name="Tabla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dddddd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5.921cm" table:align="margins"/>
    </style:style>
    <style:style style:name="Tabla4.A" style:family="table-column">
      <style:table-column-properties style:column-width="3.979cm" style:rel-column-width="16383*"/>
    </style:style>
    <style:style style:name="Tabla4.D" style:family="table-column">
      <style:table-column-properties style:column-width="3.981cm" style:rel-column-width="16386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5.921cm" table:align="margins"/>
    </style:style>
    <style:style style:name="Tabla5.A" style:family="table-column">
      <style:table-column-properties style:column-width="3.979cm" style:rel-column-width="16383*"/>
    </style:style>
    <style:style style:name="Tabla5.D" style:family="table-column">
      <style:table-column-properties style:column-width="3.981cm" style:rel-column-width="16386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5.921cm" table:align="margins"/>
    </style:style>
    <style:style style:name="Tabla6.A" style:family="table-column">
      <style:table-column-properties style:column-width="3.979cm" style:rel-column-width="16383*"/>
    </style:style>
    <style:style style:name="Tabla6.D" style:family="table-column">
      <style:table-column-properties style:column-width="3.981cm" style:rel-column-width="16386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7" style:family="table">
      <style:table-properties style:width="15.921cm" table:align="margins"/>
    </style:style>
    <style:style style:name="Tabla7.A" style:family="table-column">
      <style:table-column-properties style:column-width="15.921cm" style:rel-column-width="65535*"/>
    </style:style>
    <style:style style:name="Tabla7.A1" style:family="table-cell">
      <style:table-cell-properties fo:background-color="#dddddd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5.921cm" table:align="margins"/>
    </style:style>
    <style:style style:name="Tabla8.A" style:family="table-column">
      <style:table-column-properties style:column-width="15.921cm" style:rel-column-width="65535*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Verdana1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color="#000000" style:font-name="Verdana1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Verdana1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Verdana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Verdana1" fo:font-size="9pt" fo:font-style="normal" style:font-name-asian="Arial1" style:font-size-asian="9pt" style:font-style-asian="normal" style:font-name-complex="Arial1" style:font-size-complex="9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1" fo:font-style="normal" style:font-style-asian="normal" style:font-style-complex="normal"/>
    </style:style>
    <style:style style:name="P7" style:family="paragraph" style:parent-style-name="Standard">
      <style:paragraph-properties fo:margin-top="0.106cm" fo:margin-bottom="0.106cm" fo:text-align="start" style:justify-single-word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8" style:family="paragraph" style:parent-style-name="Standard">
      <style:paragraph-properties fo:margin-top="0.106cm" fo:margin-bottom="0.106cm" fo:text-align="start" style:justify-single-word="false"/>
      <style:text-properties fo:color="#000000" style:font-name="Verdana1" fo:font-style="normal" style:font-style-asian="normal" style:font-style-complex="normal"/>
    </style:style>
    <style:style style:name="P9" style:family="paragraph" style:parent-style-name="Standard">
      <style:paragraph-properties fo:margin-top="0cm" fo:margin-bottom="0.282cm" fo:text-align="start" style:justify-single-word="false"/>
      <style:text-properties fo:color="#000000" style:font-name="Verdana1" fo:font-size="20pt" fo:font-style="normal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P10" style:family="paragraph" style:parent-style-name="Standard">
      <style:paragraph-properties fo:margin-top="0cm" fo:margin-bottom="0.706cm" fo:text-align="start" style:justify-single-word="false"/>
      <style:text-properties fo:color="#000000" style:font-name="Verdana1" fo:font-size="18pt" fo:font-style="normal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P11" style:family="paragraph" style:parent-style-name="Standard">
      <style:paragraph-properties fo:margin-top="0.141cm" fo:margin-bottom="0.141cm" fo:text-align="start" style:justify-single-word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12" style:family="paragraph" style:parent-style-name="Standard">
      <style:paragraph-properties fo:margin-top="0.141cm" fo:margin-bottom="0.141cm" fo:text-align="start" style:justify-single-word="false"/>
      <style:text-properties style:font-name="Verdana1"/>
    </style:style>
    <style:style style:name="P13" style:family="paragraph" style:parent-style-name="Standard">
      <style:paragraph-properties fo:margin-left="0.635cm" fo:margin-right="0cm" fo:margin-top="0.071cm" fo:margin-bottom="0.141cm" fo:text-align="start" style:justify-single-word="false" fo:text-indent="0cm" style:auto-text-indent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14" style:family="paragraph" style:parent-style-name="Standard">
      <style:paragraph-properties fo:margin-top="0.282cm" fo:margin-bottom="0.071cm" fo:text-align="start" style:justify-single-word="false"/>
      <style:text-properties fo:color="#000000" style:font-name="Verdana1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5" style:family="paragraph" style:parent-style-name="Standard">
      <style:paragraph-properties fo:margin-top="0.282cm" fo:margin-bottom="0.282cm" fo:text-align="start" style:justify-single-word="false" fo:padding-left="0cm" fo:padding-right="0cm" fo:padding-top="0cm" fo:padding-bottom="0.035cm" fo:border-left="none" fo:border-right="none" fo:border-top="none" fo:border-bottom="0.026cm solid #2e74b5"/>
      <style:text-properties fo:color="#000000" style:font-name="Verdana1" fo:font-style="normal" style:font-style-asian="normal" style:font-style-complex="normal"/>
    </style:style>
    <style:style style:name="P16" style:family="paragraph" style:parent-style-name="Heading_20_3">
      <style:paragraph-properties fo:margin-top="0.423cm" fo:margin-bottom="0.212cm" fo:text-align="start" style:justify-single-word="false"/>
      <style:text-properties fo:color="#000000" style:font-name="Verdana1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7" style:family="paragraph" style:parent-style-name="Heading_20_3">
      <style:paragraph-properties fo:margin-top="0.423cm" fo:margin-bottom="0.212cm" fo:text-align="start" style:justify-single-word="false" fo:break-before="page"/>
      <style:text-properties fo:color="#000000" style:font-name="Verdana1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8" style:family="paragraph" style:parent-style-name="Heading_20_1">
      <style:paragraph-properties fo:margin-top="0.706cm" fo:margin-bottom="0.353cm" fo:text-align="start" style:justify-single-word="false" fo:break-before="page"/>
      <style:text-properties fo:color="#000000" style:font-name="Verdana1" fo:font-size="18pt" fo:font-style="normal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P19" style:family="paragraph" style:parent-style-name="Heading_20_1">
      <style:paragraph-properties fo:margin-top="0.706cm" fo:margin-bottom="0.353cm" fo:text-align="start" style:justify-single-word="false"/>
      <style:text-properties fo:color="#000000" style:font-name="Verdana1" fo:font-size="18pt" fo:font-style="normal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P20" style:family="paragraph" style:parent-style-name="Heading_20_2">
      <style:paragraph-properties fo:margin-top="0.529cm" fo:margin-bottom="0.282cm" fo:text-align="start" style:justify-single-word="false"/>
      <style:text-properties fo:color="#000000" style:font-name="Verdana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1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1" fo:font-size="11pt" style:font-name-asian="Arial1" style:font-size-asian="11pt" style:font-name-complex="Arial1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Verdana1" fo:font-size="10pt" style:font-name-asian="Arial1" style:font-size-asian="10pt" style:font-name-complex="Arial1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6" style:family="paragraph" style:parent-style-name="Standard" style:master-page-name="Standard">
      <style:paragraph-properties fo:margin-top="0.106cm" fo:margin-bottom="0.106cm" fo:text-align="start" style:justify-single-word="false" style:page-number="auto"/>
      <style:text-properties fo:color="#000000" style:font-name="Verdana1" fo:font-style="normal" style:font-style-asian="normal" style:font-style-complex="normal"/>
    </style:style>
    <style:style style:name="P27" style:family="paragraph" style:parent-style-name="Standard">
      <style:paragraph-properties fo:margin-top="0.106cm" fo:margin-bottom="0.106cm" fo:text-align="start" style:justify-single-word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8" style:family="paragraph" style:parent-style-name="Standard" style:list-style-name="L1">
      <style:paragraph-properties fo:margin-top="0.071cm" fo:margin-bottom="0.141cm" fo:text-align="start" style:justify-single-word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9" style:family="paragraph" style:parent-style-name="Standard" style:list-style-name="L2">
      <style:paragraph-properties fo:margin-top="0.071cm" fo:margin-bottom="0.141cm" fo:text-align="start" style:justify-single-word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0" style:family="paragraph" style:parent-style-name="Standard">
      <style:paragraph-properties fo:margin-left="0.635cm" fo:margin-right="0cm" fo:margin-top="0.071cm" fo:margin-bottom="0.141cm" fo:text-align="start" style:justify-single-word="false" fo:text-indent="0cm" style:auto-text-indent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1" style:family="paragraph" style:parent-style-name="Standard" style:list-style-name="L2">
      <style:paragraph-properties fo:margin-left="0.635cm" fo:margin-right="0cm" fo:margin-top="0.071cm" fo:margin-bottom="0.141cm" fo:text-align="start" style:justify-single-word="false" fo:text-indent="0cm" style:auto-text-indent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2" style:family="paragraph" style:parent-style-name="Standard" style:list-style-name="L8">
      <style:paragraph-properties fo:margin-left="0.635cm" fo:margin-right="0cm" fo:margin-top="0.071cm" fo:margin-bottom="0.141cm" fo:text-align="start" style:justify-single-word="false" fo:text-indent="0cm" style:auto-text-indent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3" style:family="paragraph" style:parent-style-name="Standard" style:list-style-name="L9">
      <style:paragraph-properties fo:margin-left="0.635cm" fo:margin-right="0cm" fo:margin-top="0.071cm" fo:margin-bottom="0.141cm" fo:text-align="start" style:justify-single-word="false" fo:text-indent="0cm" style:auto-text-indent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4" style:family="paragraph" style:parent-style-name="Standard" style:list-style-name="L10">
      <style:paragraph-properties fo:margin-left="0.635cm" fo:margin-right="0cm" fo:margin-top="0.071cm" fo:margin-bottom="0.141cm" fo:text-align="start" style:justify-single-word="false" fo:text-indent="0cm" style:auto-text-indent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5" style:family="paragraph" style:parent-style-name="Standard">
      <style:paragraph-properties fo:margin-left="0.635cm" fo:margin-right="0cm" fo:margin-top="0.071cm" fo:margin-bottom="0.141cm" fo:text-align="start" style:justify-single-word="false" fo:text-indent="0cm" style:auto-text-indent="false"/>
      <style:text-properties fo:color="#000000" style:font-name="Verdana1" fo:font-style="normal" style:font-style-asian="normal" style:font-style-complex="normal"/>
    </style:style>
    <style:style style:name="P36" style:family="paragraph" style:parent-style-name="Standard" style:list-style-name="L3">
      <style:paragraph-properties fo:margin-top="0.141cm" fo:margin-bottom="0.141cm" fo:text-align="start" style:justify-single-word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7" style:family="paragraph" style:parent-style-name="Standard" style:list-style-name="L7">
      <style:paragraph-properties fo:margin-top="0.141cm" fo:margin-bottom="0.141cm" fo:text-align="start" style:justify-single-word="false"/>
    </style:style>
    <style:style style:name="P38" style:family="paragraph" style:parent-style-name="Standard" style:list-style-name="L4">
      <style:paragraph-properties fo:margin-top="0.141cm" fo:margin-bottom="0.141cm" fo:text-align="start" style:justify-single-word="false"/>
      <style:text-properties style:font-name="Verdana1"/>
    </style:style>
    <style:style style:name="P39" style:family="paragraph" style:parent-style-name="Standard" style:list-style-name="L5">
      <style:paragraph-properties fo:margin-top="0.141cm" fo:margin-bottom="0.141cm" fo:text-align="start" style:justify-single-word="false"/>
      <style:text-properties style:font-name="Verdana1"/>
    </style:style>
    <style:style style:name="P40" style:family="paragraph" style:parent-style-name="Standard" style:list-style-name="L6">
      <style:paragraph-properties fo:margin-top="0.141cm" fo:margin-bottom="0.141cm" fo:text-align="start" style:justify-single-word="false"/>
      <style:text-properties style:font-name="Verdana1"/>
    </style:style>
    <style:style style:name="P41" style:family="paragraph" style:parent-style-name="Standard" style:list-style-name="L7">
      <style:paragraph-properties fo:margin-top="0.141cm" fo:margin-bottom="0.141cm" fo:text-align="start" style:justify-single-word="false"/>
      <style:text-properties style:font-name="Verdana1"/>
    </style:style>
    <style:style style:name="P42" style:family="paragraph" style:parent-style-name="Standard">
      <style:paragraph-properties fo:margin-top="0.282cm" fo:margin-bottom="0.071cm" fo:text-align="start" style:justify-single-word="false"/>
      <style:text-properties fo:color="#000000" style:font-name="Verdana1" fo:font-style="normal" style:font-style-asian="normal" style:font-style-complex="normal"/>
    </style:style>
    <style:style style:name="P43" style:family="paragraph" style:parent-style-name="Standard">
      <style:paragraph-properties fo:margin-top="0.282cm" fo:margin-bottom="0.071cm" fo:text-align="start" style:justify-single-word="false"/>
      <style:text-properties fo:color="#000000" style:font-name="Verdana1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.282cm" fo:margin-bottom="0.071cm" fo:text-align="start" style:justify-single-word="false" fo:text-indent="0cm" style:auto-text-indent="false"/>
      <style:text-properties fo:color="#000000" style:font-name="Verdana1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45" style:family="paragraph" style:parent-style-name="Standard">
      <style:paragraph-properties fo:margin-left="0cm" fo:margin-right="0cm" fo:margin-top="0.282cm" fo:margin-bottom="0.071cm" fo:text-align="start" style:justify-single-word="false" fo:text-indent="0cm" style:auto-text-indent="false"/>
      <style:text-properties fo:color="#000000" style:font-name="Verdana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6" style:family="paragraph" style:parent-style-name="Heading_20_3">
      <style:paragraph-properties fo:margin-top="0.423cm" fo:margin-bottom="0.212cm" fo:text-align="start" style:justify-single-word="false"/>
      <style:text-properties fo:color="#000000" style:font-name="Verdana1" fo:font-style="normal" style:font-style-asian="normal" style:font-style-complex="normal"/>
    </style:style>
    <style:style style:name="P47" style:family="paragraph" style:parent-style-name="List_20_Paragraph" style:list-style-name="WWNum2">
      <style:paragraph-properties fo:margin-top="0.106cm" fo:margin-bottom="0.106cm" fo:text-align="start" style:justify-single-word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48" style:family="paragraph" style:parent-style-name="List_20_Paragraph" style:list-style-name="WWNum3">
      <style:paragraph-properties fo:margin-top="0.106cm" fo:margin-bottom="0.106cm" fo:text-align="start" style:justify-single-word="false"/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49" style:family="paragraph" style:parent-style-name="List_20_Paragraph" style:list-style-name="WWNum3">
      <style:paragraph-properties fo:margin-top="0.106cm" fo:margin-bottom="0.106cm" fo:text-align="start" style:justify-single-word="false"/>
      <style:text-properties fo:color="#000000" style:font-name="Verdana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0" style:family="paragraph" style:parent-style-name="Heading_20_1">
      <style:paragraph-properties fo:margin-top="0.706cm" fo:margin-bottom="0.353cm" fo:text-align="start" style:justify-single-word="false"/>
      <style:text-properties fo:color="#000000" style:font-name="Verdana1" fo:font-style="normal" style:font-style-asian="normal" style:font-style-complex="normal"/>
    </style:style>
    <style:style style:name="T1" style:family="text">
      <style:text-properties fo:color="#888888" style:font-name-asian="Arial1" style:font-name-complex="Arial1"/>
    </style:style>
    <style:style style:name="T2" style:family="text">
      <style:text-properties fo:color="#000000" style:font-name="Verdana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T3" style:family="text">
      <style:text-properties fo:color="#000000" style:font-name="Verdana1" fo:font-style="normal" style:font-style-asian="normal" style:font-style-complex="normal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7" style:family="text">
      <style:text-properties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8"/>
      <text:p text:style-name="P8"/>
      <text:p text:style-name="P9">PRODUCT REQUIREMENTS DOCUMENT</text:p>
      <text:p text:style-name="P10">PRD — App Estudio Bíblico</text:p>
      <text:p text:style-name="P15"/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Producto</text:p>
          </table:table-cell>
          <table:table-cell table:style-name="Tabla1.A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4">Versión</text:p>
          </table:table-cell>
          <table:table-cell table:style-name="Tabla1.A2" office:value-type="string">
            <text:p text:style-name="P4">0.1 — Borrador inicial</text:p>
          </table:table-cell>
        </table:table-row>
        <table:table-row table:style-name="Tabla1.1">
          <table:table-cell table:style-name="Tabla1.A2" office:value-type="string">
            <text:p text:style-name="P4">Fecha</text:p>
          </table:table-cell>
          <table:table-cell table:style-name="Tabla1.B3" office:value-type="date" office:date-value="2026-05-21">
            <text:p text:style-name="P3">21/05/26</text:p>
          </table:table-cell>
        </table:table-row>
        <table:table-row table:style-name="Tabla1.1">
          <table:table-cell table:style-name="Tabla1.A2" office:value-type="string">
            <text:p text:style-name="P4">Autor</text:p>
          </table:table-cell>
          <table:table-cell table:style-name="Tabla1.A2" office:value-type="string">
            <text:p text:style-name="P3">Guido Cafferata</text:p>
          </table:table-cell>
        </table:table-row>
        <table:table-row table:style-name="Tabla1.1">
          <table:table-cell table:style-name="Tabla1.A2" office:value-type="string">
            <text:p text:style-name="P4">Cliente / Pastor</text:p>
          </table:table-cell>
          <table:table-cell table:style-name="Tabla1.A2" office:value-type="string">
            <text:p text:style-name="P3">Iglesia Alianza Cristiana y Misionera Vida y Familia</text:p>
          </table:table-cell>
        </table:table-row>
        <table:table-row table:style-name="Tabla1.1">
          <table:table-cell table:style-name="Tabla1.A2" office:value-type="string">
            <text:p text:style-name="P4">Estado</text:p>
          </table:table-cell>
          <table:table-cell table:style-name="Tabla1.A2" office:value-type="string">
            <text:p text:style-name="P4">En definición</text:p>
          </table:table-cell>
        </table:table-row>
      </table:table>
      <text:p text:style-name="P8"/>
      <text:p text:style-name="P8"/>
      <text:p text:style-name="P5">Documento confidencial — uso interno</text:p>
      <text:p text:style-name="P6"/>
      <text:h text:style-name="P18" text:outline-level="1">ÍNDICE</text:h>
      <text:p text:style-name="P15"/>
      <text:list xml:id="list4123480445215863431" text:style-name="WWNum2">
        <text:list-item>
          <text:p text:style-name="P47">Resumen ejecutivo</text:p>
        </text:list-item>
        <text:list-item>
          <text:p text:style-name="P47">Objetivo del producto</text:p>
        </text:list-item>
        <text:list-item>
          <text:p text:style-name="P47">Usuarios y audiencia</text:p>
        </text:list-item>
        <text:list-item>
          <text:p text:style-name="P47">Contextos de uso</text:p>
        </text:list-item>
        <text:list-item>
          <text:p text:style-name="P47">Funcionalidades requeridas</text:p>
        </text:list-item>
        <text:list-item>
          <text:p text:style-name="P47">Preferencias y configuración del usuario</text:p>
        </text:list-item>
        <text:list-item>
          <text:p text:style-name="P47">Flujo principal de uso</text:p>
        </text:list-item>
        <text:list-item>
          <text:p text:style-name="P47">Pantallas / Vistas de la app</text:p>
        </text:list-item>
        <text:list-item>
          <text:p text:style-name="P47">Requisitos técnicos</text:p>
        </text:list-item>
        <text:list-item>
          <text:p text:style-name="P47">Fuera del alcance (v1.0)</text:p>
        </text:list-item>
        <text:list-item>
          <text:p text:style-name="P47">Criterios de aceptación</text:p>
        </text:list-item>
        <text:list-item>
          <text:p text:style-name="P47">Preguntas abiertas</text:p>
        </text:list-item>
      </text:list>
      <text:p text:style-name="P6"/>
      <text:h text:style-name="P18" text:outline-level="1">1. Resumen Ejecutivo</text:h>
      <text:p text:style-name="P15"/>
      <text:p text:style-name="P7">Una Progressive Web App (PWA) que permite a pastores, líderes y creyentes en general ingresar un texto bíblico y recibir automáticamente material de estudio completo: análisis exegético, comentarios de grandes teólogos protestantes, serie de sermones, curso de estudio bíblico y devocionarios para 30 días.<text:line-break/><text:line-break/>Esto permitirá entender mejor el mensaje bíblico, para provecho propio y para trasmitir un mejor conocimiento de la palabra de Dios.</text:p>
      <text:p text:style-name="P11"/>
      <text:h text:style-name="P19" text:outline-level="1">2. Objetivo del Producto</text:h>
      <text:p text:style-name="P15"/>
      <text:h text:style-name="P16" text:outline-level="3">Objetivo principal</text:h>
      <text:p text:style-name="P13">Proporcionar una herramienta, el PWA, de fácil uso y acceso para obtener lo siguiente:</text:p>
      <text:list xml:id="list4219647357394541891" text:style-name="L1">
        <text:list-item>
          <text:p text:style-name="P28">Preparación de las prédicas pastorales en los cultos de las iglesias</text:p>
        </text:list-item>
        <text:list-item>
          <text:p text:style-name="P28">Entender y conocer mejor el mensaje de Dios</text:p>
        </text:list-item>
        <text:list-item>
          <text:p text:style-name="P28">Conocer las opiniones y comentarios de prestigiosos teólogos protestantes</text:p>
        </text:list-item>
        <text:list-item>
          <text:p text:style-name="P28">Preparar material para estudio bíblico en comunidad</text:p>
        </text:list-item>
      </text:list>
      <text:h text:style-name="P16" text:outline-level="3">Objetivos secundarios</text:h>
      <text:p text:style-name="P13">Que el material obtenido por la app de una amplia visión sobre el mensaje que el texto consultado y conocer otras opiniones y comentarios.</text:p>
      <text:h text:style-name="P16" text:outline-level="3">Lo que NO es el objetivo de esta versión</text:h>
      <text:p text:style-name="P13">Reemplazar, tratar de imponer y/o sustituir los criterios propios de la persona interesada y los métodos de investigación tradicionales en el conocimiento profundo de la Palabra. Me estoy refiriendo a la lectura de la Biblia, acudir a las fuentes originales, papiros, rollos, pergaminos, etc.</text:p>
      <text:p text:style-name="P6"/>
      <text:h text:style-name="P18" text:outline-level="1">3. Usuarios y Audiencia</text:h>
      <text:p text:style-name="P15"/>
      <text:h text:style-name="P16" text:outline-level="3">Usuario primario</text:h>
      <text:p text:style-name="P14">Perfil</text:p>
      <text:p text:style-name="P13">Pastores de la red de Iglesias de la congregación: </text:p>
      <text:p text:style-name="P13">Alianza Cristiana y Misionera Vida y Familia. (ACyMVF)</text:p>
      <text:p text:style-name="P14">Nivel técnico</text:p>
      <text:p text:style-name="P13">Intermedio y/o Avanzado</text:p>
      <text:p text:style-name="P14">Necesidad principal</text:p>
      <text:p text:style-name="P13">Orientación para la preparación de una predica o sermón.</text:p>
      <text:p text:style-name="P14">Frecuencia de uso esperada</text:p>
      <text:p text:style-name="P13">Semanal y/o Ocasional</text:p>
      <text:p text:style-name="P8"/>
      <text:h text:style-name="P16" text:outline-level="3">Usuario secundario</text:h>
      <text:p text:style-name="P14">Perfil</text:p>
      <text:p text:style-name="P13">Miembros del grupo Estudio Bíblico en Comunidad (EBC)</text:p>
      <text:p text:style-name="P14">Nivel técnico</text:p>
      <text:p text:style-name="P13">Desde básico a mas alto</text:p>
      <text:p text:style-name="P14">Necesidad principal</text:p>
      <text:p text:style-name="P13">Interpretar el mensaje de la Palabra y como aplicarlo a su vida.</text:p>
      <text:p text:style-name="P8"/>
      <text:h text:style-name="P16" text:outline-level="3">Usuario terciario</text:h>
      <text:p text:style-name="P14">Perfil</text:p>
      <text:p text:style-name="P13">Creyente en estudio personal</text:p>
      <text:p text:style-name="P14">Nivel técnico</text:p>
      <text:p text:style-name="P13">Cualquiera</text:p>
      <text:p text:style-name="P14">Necesidad principal</text:p>
      <text:p text:style-name="P13">Interés en conocer el mensaje de Dios</text:p>
      <text:p text:style-name="P6"/>
      <text:h text:style-name="P18" text:outline-level="1">4. Contextos de Uso</text:h>
      <text:p text:style-name="P15"/>
      <text:p text:style-name="P11">Situaciones concretas se usará la PWA:</text:p>
      <text:p text:style-name="P8"/>
      <text:list xml:id="list8172452478446987437" text:style-name="WWNum3">
        <text:list-item>
          <text:p text:style-name="P49">Preparación de sermones dominicales</text:p>
        </text:list-item>
      </text:list>
      <text:p text:style-name="P13"><text:tab/>Principalmente los Pastores de la Iglesias</text:p>
      <text:list xml:id="list33570470" text:continue-numbering="true" text:style-name="WWNum3">
        <text:list-item>
          <text:p text:style-name="P49">Escuela Bíblica / Educación cristiana</text:p>
        </text:list-item>
      </text:list>
      <text:p text:style-name="P13"><text:tab/>Grupos de EBC</text:p>
      <text:list xml:id="list33584250" text:continue-numbering="true" text:style-name="WWNum3">
        <text:list-item>
          <text:p text:style-name="P49">Grupos pequeños / Células</text:p>
        </text:list-item>
      </text:list>
      <text:p text:style-name="P13"><text:tab/>Células de oración, como los 330</text:p>
      <text:list xml:id="list33576802" text:continue-numbering="true" text:style-name="WWNum3">
        <text:list-item>
          <text:p text:style-name="P49">Retiros espirituales</text:p>
        </text:list-item>
      </text:list>
      <text:p text:style-name="P13"><text:tab/>En la preparación del material para las actividades pastorales del retiro</text:p>
      <text:list xml:id="list33583151" text:continue-numbering="true" text:style-name="WWNum3">
        <text:list-item>
          <text:p text:style-name="P49">Estudio personal / Devocional</text:p>
        </text:list-item>
      </text:list>
      <text:p text:style-name="P13"><text:tab/>Todo creyente interesado en conocer mas la Palabra </text:p>
      <text:list xml:id="list33568043" text:continue-numbering="true" text:style-name="WWNum3">
        <text:list-item>
          <text:p text:style-name="P49">Otros:</text:p>
        </text:list-item>
      </text:list>
      <text:p text:style-name="P13"><text:tab/>Cualquiera que sienta el llamado de Cristo</text:p>
      <text:p text:style-name="P6"/>
      <text:h text:style-name="P19" text:outline-level="1">5. Funcionalidades Requeridas</text:h>
      <text:p text:style-name="P15"/>
      <text:h text:style-name="P20" text:outline-level="2">5.1 Funcionalidades Esenciales (Must Have — v1.0)</text:h>
      <text:h text:style-name="P16" text:outline-level="3">F01 — Entrada de texto bíblico</text:h>
      <text:p text:style-name="P14">Descripción</text:p>
      <text:p text:style-name="P13">El texto bíblico, materia de consulta se ingresara de la siguiente manera:</text:p>
      <text:list xml:id="list6902660337819712312" text:style-name="L2">
        <text:list-item>
          <text:p text:style-name="P31">Se seleccionará la versión de la biblia a la cual referirse</text:p>
        </text:list-item>
        <text:list-item>
          <text:p text:style-name="P29">Para el texto se podrá usar un selector de: libro/capítulo/versículo(s)</text:p>
        </text:list-item>
      </text:list>
      <text:p text:style-name="P14">Criterio de aceptación</text:p>
      <text:p text:style-name="P13">Cuando la app compruebe que existe</text:p>
      <text:h text:style-name="P16" text:outline-level="3">F02 — Configuración de preferencias</text:h>
      <text:p text:style-name="P14">Descripción</text:p>
      <text:p text:style-name="P13">Se refiere a las preferencias puede configurar el usuario al realizar la consulta. Estas se guardan entre sesiones</text:p>
      <text:p text:style-name="P14">Preferencias incluidas</text:p>
      <text:list xml:id="list33586237" text:continue-list="list33568043" text:style-name="WWNum3">
        <text:list-item>
          <text:p text:style-name="P49">Audiencia (adultos, jóvenes, líderes, nuevos creyentes...)</text:p>
        </text:list-item>
        <text:list-item>
          <text:p text:style-name="P49">Contexto de uso (escuela bíblica, culto, grupo pequeño...)</text:p>
        </text:list-item>
        <text:list-item>
          <text:p text:style-name="P49"><text:soft-page-break/>Énfasis temático (reconciliación, santificación, evangelismo...)</text:p>
        </text:list-item>
        <text:list-item>
          <text:p text:style-name="P49">Tradición teológica (Alianza Cristiana, reformada, bautista...)</text:p>
        </text:list-item>
        <text:list-item>
          <text:p text:style-name="P49">Tono de sermones (expositivo, pastoral, evangelístico...)</text:p>
        </text:list-item>
        <text:list-item>
          <text:p text:style-name="P49">Extensión de sermones (corto 20 min, normal 35-40, largo 50+)</text:p>
        </text:list-item>
      </text:list>
      <text:h text:style-name="P16" text:outline-level="3">F03 — Contenido que se desea obtener</text:h>
      <text:p text:style-name="P14">Descripción</text:p>
      <text:p text:style-name="P13">Se refiere al material que el usuario desea obtener de una serie de opciones que a continuación se muestran</text:p>
      <text:p text:style-name="P14">Contenido deseado</text:p>
      <text:list xml:id="list33577062" text:continue-numbering="true" text:style-name="WWNum3">
        <text:list-item>
          <text:p text:style-name="P49">Análisis exegético, teológico y pastoral</text:p>
        </text:list-item>
        <text:list-item>
          <text:p text:style-name="P49">Comentarios de comentaristas protestantes clásicos</text:p>
        </text:list-item>
        <text:list-item>
          <text:p text:style-name="P49">Serie de 4 sermones expositivos</text:p>
        </text:list-item>
        <text:list-item>
          <text:p text:style-name="P49">Curso de estudio bíblico (4 lecciones)</text:p>
        </text:list-item>
        <text:list-item>
          <text:p text:style-name="P49">Devocionarios para 30 días</text:p>
        </text:list-item>
      </text:list>
      <text:p text:style-name="P14">¿Se guardan las preferencias y el contenido?</text:p>
      <text:p text:style-name="P13">Sí, para posteriores sesiones</text:p>
      <text:h text:style-name="P16" text:outline-level="3">F04 — Generación de material completo</text:h>
      <text:p text:style-name="P14">Descripción</text:p>
      <text:p text:style-name="P13">La app generará la información solicitada por el usuario de acuerdo a sus preferencias y contenido deseado</text:p>
      <text:p text:style-name="P14">Tiempo de respuesta esperado</text:p>
      <text:p text:style-name="P13">Mostrar el progreso si es posible o solo un mensaje que se está produciendo el material</text:p>
      <text:h text:style-name="P16" text:outline-level="3">F05 — Visualización del material</text:h>
      <text:p text:style-name="P14">Descripción</text:p>
      <text:p text:style-name="P13">Para una mejor presentación, por secciones en un solo documento.</text:p>
      <text:h text:style-name="P16" text:outline-level="3">F06 — Exportación / Descarga</text:h>
      <text:p text:style-name="P14">Descripción</text:p>
      <text:p text:style-name="P13">Una vez que el material este terminado y presentado en pantalla, se dará la opción a usuario en descargarlo en estos formatos: Word, PDF, texto</text:p>
      <text:h text:style-name="P20" text:outline-level="2">5.2 Funcionalidades Deseables (Nice to Have — futuras versiones)</text:h>
      <text:p text:style-name="P13">Se definirá en el futuro después de tener la experiencia de esta primera versión</text:p>
      <text:p text:style-name="P6"/>
      <text:h text:style-name="P18" text:outline-level="1">6. Preferencias y Configuración del Usuario</text:h>
      <text:p text:style-name="P15"/>
      <text:p text:style-name="P11">Para cada preferencia, define los valores posibles y el valor por defecto: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>Preferencia</text:p>
          </table:table-cell>
          <table:table-cell table:style-name="Tabla2.A1" office:value-type="string">
            <text:p text:style-name="P2">Opciones disponibles</text:p>
          </table:table-cell>
          <table:table-cell table:style-name="Tabla2.A1" office:value-type="string">
            <text:p text:style-name="P2">Valor por defecto</text:p>
          </table:table-cell>
          <table:table-cell table:style-name="Tabla2.A1" office:value-type="string">
            <text:p text:style-name="P2">¿Guardar?</text:p>
          </table:table-cell>
        </table:table-row>
        <table:table-row table:style-name="Tabla2.1">
          <table:table-cell table:style-name="Tabla2.A2" office:value-type="string">
            <text:p text:style-name="P4">Audiencia</text:p>
          </table:table-cell>
          <table:table-cell table:style-name="Tabla2.A2" office:value-type="string">
            <text:p text:style-name="P4">Adultos / Líderes / Jóvenes / Nuevos creyentes / Familias</text:p>
          </table:table-cell>
          <table:table-cell table:style-name="Tabla2.A2" office:value-type="string">
            <text:p text:style-name="P4">Adultos</text:p>
          </table:table-cell>
          <table:table-cell table:style-name="Tabla2.A2" office:value-type="string">
            <text:p text:style-name="P4">Sí</text:p>
          </table:table-cell>
        </table:table-row>
        <table:table-row table:style-name="Tabla2.1">
          <table:table-cell table:style-name="Tabla2.A2" office:value-type="string">
            <text:p text:style-name="P4">Contexto</text:p>
          </table:table-cell>
          <table:table-cell table:style-name="Tabla2.A2" office:value-type="string">
            <text:p text:style-name="P4">Escuela bíblica / Culto / Grupo pequeño / Retiro / Personal</text:p>
          </table:table-cell>
          <table:table-cell table:style-name="Tabla2.A2" office:value-type="string">
            <text:p text:style-name="P3">Culto</text:p>
          </table:table-cell>
          <table:table-cell table:style-name="Tabla2.A2" office:value-type="string">
            <text:p text:style-name="P3">Si</text:p>
          </table:table-cell>
        </table:table-row>
        <table:table-row table:style-name="Tabla2.1">
          <table:table-cell table:style-name="Tabla2.A2" office:value-type="string">
            <text:p text:style-name="P4">Énfasis</text:p>
          </table:table-cell>
          <table:table-cell table:style-name="Tabla2.A2" office:value-type="string">
            <text:p text:style-name="P4">Reconciliación / Integridad / Relaciones / Santificación / Evangelismo...</text:p>
          </table:table-cell>
          <table:table-cell table:style-name="Tabla2.A2" office:value-type="string">
            <text:p text:style-name="P3">Evangelismo</text:p>
          </table:table-cell>
          <table:table-cell table:style-name="Tabla2.A2" office:value-type="string">
            <text:p text:style-name="P3">Si</text:p>
          </table:table-cell>
        </table:table-row>
        <table:table-row table:style-name="Tabla2.1">
          <table:table-cell table:style-name="Tabla2.A2" office:value-type="string">
            <text:p text:style-name="P4">Tradición</text:p>
          </table:table-cell>
          <table:table-cell table:style-name="Tabla2.A2" office:value-type="string">
            <text:p text:style-name="P4">Alianza Cristiana / Reformada / Bautista / Pentecostal / Wesleyana...</text:p>
          </table:table-cell>
          <table:table-cell table:style-name="Tabla2.A2" office:value-type="string">
            <text:p text:style-name="P3">Alianza Cristiana</text:p>
          </table:table-cell>
          <table:table-cell table:style-name="Tabla2.A2" office:value-type="string">
            <text:p text:style-name="P3">Si</text:p>
          </table:table-cell>
        </table:table-row>
        <table:table-row table:style-name="Tabla2.1">
          <table:table-cell table:style-name="Tabla2.A2" office:value-type="string">
            <text:p text:style-name="P4">Tono sermones</text:p>
          </table:table-cell>
          <table:table-cell table:style-name="Tabla2.A2" office:value-type="string">
            <text:p text:style-name="P4">Expositivo / Pastoral / Evangelístico / Didáctico / Narrativo</text:p>
          </table:table-cell>
          <table:table-cell table:style-name="Tabla2.A2" office:value-type="string">
            <text:p text:style-name="P3">Evangelistico</text:p>
          </table:table-cell>
          <table:table-cell table:style-name="Tabla2.A2" office:value-type="string">
            <text:p text:style-name="P3">Si</text:p>
          </table:table-cell>
        </table:table-row>
        <table:table-row table:style-name="Tabla2.1">
          <table:table-cell table:style-name="Tabla2.A2" office:value-type="string">
            <text:p text:style-name="P4">Extensión</text:p>
          </table:table-cell>
          <table:table-cell table:style-name="Tabla2.A2" office:value-type="string">
            <text:p text:style-name="P4">Corto (20 min) / Normal (35-40 min) / Largo (50+ min)</text:p>
          </table:table-cell>
          <table:table-cell table:style-name="Tabla2.A2" office:value-type="string">
            <text:p text:style-name="P3">Corto</text:p>
          </table:table-cell>
          <table:table-cell table:style-name="Tabla2.A2" office:value-type="string">
            <text:p text:style-name="P3">Si</text:p>
          </table:table-cell>
        </table:table-row>
      </table:table>
      <text:p text:style-name="P6"/>
      <text:h text:style-name="P19" text:outline-level="1">7. Flujo Principal de Uso</text:h>
      <text:p text:style-name="P15"/>
      <text:p text:style-name="P11">Los pasos que debe seguir un usuario de la app se describen a continuación:</text:p>
      <text:list xml:id="list8856175543262072073" text:style-name="L3">
        <text:list-item>
          <text:p text:style-name="P36">El usuario abre la app en su móvil, tablet o PC</text:p>
        </text:list-item>
        <text:list-item>
          <text:p text:style-name="P36">La app generará automáticamente un UUID (Universally Unique Identifier) independiente del medio que se use: Móvil, Tablet y/o PC, que se guardara en el localStorage.<text:line-break/>Servirá para comprobar si es usuario ya registrado o no.</text:p>
        </text:list-item>
      </text:list>
      <text:list xml:id="list7479674837752613354" text:style-name="L4">
        <text:list-item>
          <text:p text:style-name="P38">Si no está registrado en el LocalStorage, se pedirá el registro para el uso de la app</text:p>
        </text:list-item>
        <text:list-item>
          <text:p text:style-name="P38">Si esta registrado se leerá la información del localStorage para su uso posterior.</text:p>
        </text:list-item>
        <text:list-item>
          <text:p text:style-name="P38">Se presentará una pantalla de bienvenida mostrando el logo de la Iglesia, el nombre de la App, parte del texto de Hch 17:11 y dos iconos para seleccionar el idioma ES o EN y dependiendo de localStorage, lo siguiente:</text:p>
          <text:list>
            <text:list-item>
              <text:p text:style-name="P38">Primera vez, un botón con la etiqueta 'Registrarse'</text:p>
            </text:list-item>
            <text:list-item>
              <text:p text:style-name="P38">Siguientes veces: El mensaje de bienvenida + [Nombre] y un botón con la etiqueta de 'Entrar' o 'Continuar'</text:p>
            </text:list-item>
          </text:list>
        </text:list-item>
      </text:list>
      <text:list xml:id="list3281783907700320604" text:style-name="L5">
        <text:list-header>
          <text:p text:style-name="P39">La siguiente pantalla sera la de Registro/Confirmación (RegCon)</text:p>
        </text:list-header>
      </text:list>
      <text:list xml:id="list4860520168327611736" text:style-name="L6">
        <text:list-item>
          <text:p text:style-name="P40">Si es la opción 5.a) se presentará otra pantalla y se le pedirá los siguientes datos:</text:p>
          <text:list>
            <text:list-item>
              <text:p text:style-name="P40"><text:soft-page-break/>Nombre, solo el de pila</text:p>
            </text:list-item>
            <text:list-item>
              <text:p text:style-name="P40">Nacido el Año,</text:p>
            </text:list-item>
            <text:list-item>
              <text:p text:style-name="P40">Iglesia de la ACyM, en este orden: Fuenlabrada, Oporto, Illescas, Campello, Moncada, Granollers, Yunqueras, Torrejon, Guadalajara, Buenos Aires, Calpe, Benidorm </text:p>
            </text:list-item>
            <text:list-item>
              <text:p text:style-name="P40">Relación con la iglesia, entre: </text:p>
              <text:list>
                <text:list-item>
                  <text:p text:style-name="P40">Pastor, </text:p>
                </text:list-item>
                <text:list-item>
                  <text:p text:style-name="P40">Misionero</text:p>
                </text:list-item>
                <text:list-item>
                  <text:p text:style-name="P40">Miembro de EBC</text:p>
                </text:list-item>
                <text:list-item>
                  <text:p text:style-name="P40">Creyente</text:p>
                </text:list-item>
                <text:list-item>
                  <text:p text:style-name="P40">Otro</text:p>
                </text:list-item>
              </text:list>
            </text:list-item>
            <text:list-item>
              <text:p text:style-name="P40">Preferencia de plataforma IA, </text:p>
            </text:list-item>
          </text:list>
        </text:list-item>
      </text:list>
      <text:p text:style-name="P12"><text:tab/>Finalmente un botón para 'Aceptar'</text:p>
      <text:list xml:id="list1359741747733685354" text:style-name="L7">
        <text:list-item>
          <text:p text:style-name="P41">Si la Opción es 5.b) se presentará el mismo esquema que el punto 6. pero marcando la opción señalada en su última consulta, tendrá oportunidad de modificar cualquier opción.</text:p>
        </text:list-item>
        <text:list-item>
          <text:p text:style-name="P41">Todas la opciones seleccionadas el los puntos 6 ó 7 serán guardadas en el localStorage.</text:p>
        </text:list-item>
        <text:list-item>
          <text:p text:style-name="P41">Terminada con la pantalla de RegCon se pasará a otra pantalla que llamaremos de 'Consulta'</text:p>
        </text:list-item>
        <text:list-item>
          <text:p text:style-name="P37"><text:span text:style-name="T4">Esta tercera pantalla servirá para: Introducir el texto a consultar, </text:span><text:span text:style-name="T3">seleccionar la Preferencias y el Contenido deseado. Tendrá un botón 'Consultar'</text:span></text:p>
        </text:list-item>
        <text:list-item>
          <text:p text:style-name="P37"><text:span text:style-name="T3">Finalmente en el proceso de consulta se mostrará un avance de la e</text:span><text:span text:style-name="T4">laboración de la misma con un mensaje de espera.</text:span></text:p>
        </text:list-item>
        <text:list-item>
          <text:p text:style-name="P37"><text:span text:style-name="T3">Terminada la consulta, se presentará el material obtenido dando la oportunidad al usuario de descargarlos en los formatos: </text:span><text:span text:style-name="T2">Word, PDF, texto</text:span></text:p>
        </text:list-item>
      </text:list>
      <text:p text:style-name="P13"/>
      <text:p text:style-name="P6"/>
      <text:h text:style-name="P18" text:outline-level="1">8. Pantallas / Vistas de la App</text:h>
      <text:p text:style-name="P15"/>
      <text:p text:style-name="P11">Lista las pantallas que necesita la app y describe brevemente su contenido:</text:p>
      <text:p text:style-name="P8"/>
      <text:h text:style-name="P16" text:outline-level="3">Pantalla 1 — Inicial</text:h>
      <text:p text:style-name="P14">Propósito</text:p>
      <text:p text:style-name="P13">Dar la bienvenida al usuario e identificarlo si ya es usuario de la App</text:p>
      <text:p text:style-name="P14">Elementos principales</text:p>
      <text:p text:style-name="P13">Dos iconos en la parte superior derecha que indican el idioma a seleccionar, ES / EN, por defecto ES</text:p>
      <text:p text:style-name="P13">El logotipo de la iglesia centrado en la pantalla, horizontal</text:p>
      <text:p text:style-name="P13">Mensaje de bienvenida:</text:p>
      <text:p text:style-name="P13">Si es la Primera vez 'Bienvenido a [Nombre App </text:p>
      <text:p text:style-name="P14">Acciones posibles</text:p>
      <text:p text:style-name="P13">Solo continuar a la siguiente pantalla para su registro y/o confirmación de su </text:p>
      <text:p text:style-name="P14">Diseño aproximado de la pantalla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Primera vez</text:p>
          </table:table-cell>
          <table:table-cell table:style-name="Tabla3.B1" office:value-type="string">
            <text:p text:style-name="P22">Siguientes veces</text:p>
          </table:table-cell>
        </table:table-row>
        <table:table-row>
          <table:table-cell table:style-name="Tabla3.A2" office:value-type="string">
            <text:p text:style-name="P21"><draw:frame draw:style-name="fr1" draw:name="gráficos1" text:anchor-type="paragraph" svg:width="4.683cm" svg:height="6.218cm" draw:z-index="1"><draw:image xlink:href="Pictures/10000201000000B1000000EB73A6E865.png" xlink:type="simple" xlink:show="embed" xlink:actuate="onLoad"/></draw:frame></text:p>
          </table:table-cell>
          <table:table-cell table:style-name="Tabla3.B2" office:value-type="string">
            <text:p text:style-name="P21"><draw:frame draw:style-name="fr1" draw:name="gráficos2" text:anchor-type="paragraph" svg:width="4.683cm" svg:height="6.165cm" draw:z-index="2"><draw:image xlink:href="Pictures/10000201000000B1000000E9D94CB75C.png" xlink:type="simple" xlink:show="embed" xlink:actuate="onLoad"/></draw:frame></text:p>
          </table:table-cell>
        </table:table-row>
      </table:table>
      <text:p text:style-name="P8"/>
      <text:h text:style-name="P17" text:outline-level="3">Pantalla 2 — RegCon</text:h>
      <text:p text:style-name="P14">Propósito</text:p>
      <text:p text:style-name="P13">Registrar o presentar la identificación del usuario y su función en la iglesia.</text:p>
      <text:p text:style-name="P14">Elementos principales</text:p>
      <text:p text:style-name="P13">Se le pedirá que los siguientes datos:</text:p>
      <text:p text:style-name="P13">1. Nombre: solo el de pila</text:p>
      <text:list xml:id="list5617330195275757929" text:style-name="L8">
        <text:list-header>
          <text:p text:style-name="P32">2. Año de nacimiento: servirá para conocer si es adulto, joven o adolescente</text:p>
        </text:list-header>
      </text:list>
      <text:list xml:id="list7439936204524632809" text:style-name="L9">
        <text:list-header>
          <text:p text:style-name="P33">3. Iglesia a la que asiste: de las iglesias de ACyMVF, se podrá seleccionar una de estas:</text:p>
        </text:list-header>
      </text:list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23">Funlabrada</text:p>
          </table:table-cell>
          <table:table-cell table:style-name="Tabla4.A1" office:value-type="string">
            <text:p text:style-name="P23">Oporto</text:p>
          </table:table-cell>
          <table:table-cell table:style-name="Tabla4.A1" office:value-type="string">
            <text:p text:style-name="P23">Illescas</text:p>
          </table:table-cell>
          <table:table-cell table:style-name="Tabla4.D1" office:value-type="string">
            <text:p text:style-name="P23">Campello</text:p>
          </table:table-cell>
        </table:table-row>
        <table:table-row>
          <table:table-cell table:style-name="Tabla4.A2" office:value-type="string">
            <text:p text:style-name="P23">Moncada</text:p>
          </table:table-cell>
          <table:table-cell table:style-name="Tabla4.A2" office:value-type="string">
            <text:p text:style-name="P23">Granollers</text:p>
          </table:table-cell>
          <table:table-cell table:style-name="Tabla4.A2" office:value-type="string">
            <text:p text:style-name="P23">Yunqueras</text:p>
          </table:table-cell>
          <table:table-cell table:style-name="Tabla4.D2" office:value-type="string">
            <text:p text:style-name="P23">Torrejon</text:p>
          </table:table-cell>
        </table:table-row>
        <table:table-row>
          <table:table-cell table:style-name="Tabla4.A2" office:value-type="string">
            <text:p text:style-name="P23">Guadalajara</text:p>
          </table:table-cell>
          <table:table-cell table:style-name="Tabla4.A2" office:value-type="string">
            <text:p text:style-name="P23">Buenos Aires</text:p>
          </table:table-cell>
          <table:table-cell table:style-name="Tabla4.A2" office:value-type="string">
            <text:p text:style-name="P23">Calpe</text:p>
          </table:table-cell>
          <table:table-cell table:style-name="Tabla4.D2" office:value-type="string">
            <text:p text:style-name="P23">Benidorm</text:p>
          </table:table-cell>
        </table:table-row>
        <table:table-row>
          <table:table-cell table:style-name="Tabla4.A2" office:value-type="string">
            <text:p text:style-name="P23">Roma</text:p>
          </table:table-cell>
          <table:table-cell table:style-name="Tabla4.A2" office:value-type="string">
            <text:p text:style-name="P23">Londres</text:p>
          </table:table-cell>
          <table:table-cell table:style-name="Tabla4.A2" office:value-type="string">
            <text:p text:style-name="P23"/>
          </table:table-cell>
          <table:table-cell table:style-name="Tabla4.D2" office:value-type="string">
            <text:p text:style-name="P23"/>
          </table:table-cell>
        </table:table-row>
      </table:table>
      <text:p text:style-name="P13">4. Relación con la iglesia: de las siguientes relaciones:</text:p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23">Pastor</text:p>
          </table:table-cell>
          <table:table-cell table:style-name="Tabla5.A1" office:value-type="string">
            <text:p text:style-name="P23">Misionero</text:p>
          </table:table-cell>
          <table:table-cell table:style-name="Tabla5.A1" office:value-type="string">
            <text:p text:style-name="P23">Miembro EBC</text:p>
          </table:table-cell>
          <table:table-cell table:style-name="Tabla5.D1" office:value-type="string">
            <text:p text:style-name="P23">Creyente</text:p>
          </table:table-cell>
        </table:table-row>
        <table:table-row>
          <table:table-cell table:style-name="Tabla5.A2" office:value-type="string">
            <text:p text:style-name="P23">Prácticas pastorales</text:p>
          </table:table-cell>
          <table:table-cell table:style-name="Tabla5.A2" office:value-type="string">
            <text:p text:style-name="P23">Lider de grupo</text:p>
          </table:table-cell>
          <table:table-cell table:style-name="Tabla5.A2" office:value-type="string">
            <text:p text:style-name="P23"/>
          </table:table-cell>
          <table:table-cell table:style-name="Tabla5.D2" office:value-type="string">
            <text:p text:style-name="P23"/>
          </table:table-cell>
        </table:table-row>
      </table:table>
      <text:list xml:id="list1193237713751368748" text:style-name="L10">
        <text:list-item>
          <text:p text:style-name="P34">Preferencia de plataforma IA a consultar</text:p>
        </text:list-item>
      </text:list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23">Claude</text:p>
          </table:table-cell>
          <table:table-cell table:style-name="Tabla6.A1" office:value-type="string">
            <text:p text:style-name="P23">ChatGPT</text:p>
          </table:table-cell>
          <table:table-cell table:style-name="Tabla6.A1" office:value-type="string">
            <text:p text:style-name="P23">DeepSeek</text:p>
          </table:table-cell>
          <table:table-cell table:style-name="Tabla6.D1" office:value-type="string">
            <text:p text:style-name="P23">Gemini</text:p>
          </table:table-cell>
        </table:table-row>
      </table:table>
      <text:p text:style-name="P14">Acciones posibles</text:p>
      <text:p text:style-name="P13">Registrarse, Modificar sus datos, seguir con la consulta, pantalla3</text:p>
      <text:p text:style-name="P14">Diseño aproximado de la pantalla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5">Pantalla de Registro o de Confirmación </text:p>
          </table:table-cell>
        </table:table-row>
        <table:table-row>
          <table:table-cell table:style-name="Tabla7.A2" office:value-type="string">
            <text:p text:style-name="P24"><draw:frame draw:style-name="fr1" draw:name="gráficos3" text:anchor-type="paragraph" svg:width="4.604cm" svg:height="6.773cm" draw:z-index="3"><draw:image xlink:href="Pictures/10000201000000AE00000100F60CAB0E.png" xlink:type="simple" xlink:show="embed" xlink:actuate="onLoad"/></draw:frame>Los campos sombreados de las opciones simulan lo seleccionado por el usuario</text:p>
          </table:table-cell>
        </table:table-row>
      </table:table>
      <text:p text:style-name="P14"/>
      <text:h text:style-name="P17" text:outline-level="3">Pantalla 3 — Consulta</text:h>
      <text:p text:style-name="P14">Propósito</text:p>
      <text:p text:style-name="P13">La penúltima pantalla donde se indicará el texto bíblico a consultar y las preferencias y el contenido que se desea obtener de la consulta.</text:p>
      <text:p text:style-name="P14">Elementos principales</text:p>
      <text:p text:style-name="P13">Ingreso del texto bíblico a consultar, en la modalidad Libro/Capítulo/Versículos, las preferencias y el contenido entre varias opciones</text:p>
      <text:p text:style-name="P14">Acciones posibles</text:p>
      <text:p text:style-name="P13">Las opciones a seleccionar serán del tipo ComboListBox para las preferencias y de ListBox para el contenido.</text:p>
      <text:p text:style-name="P14">Diseño aproximado de la pantalla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2">Pantalla para texto bíblico, preferencias y contenido deseado</text:p>
          </table:table-cell>
        </table:table-row>
        <table:table-row>
          <table:table-cell table:style-name="Tabla8.A2" office:value-type="string">
            <text:p text:style-name="P21"><draw:frame draw:style-name="fr1" draw:name="gráficos4" text:anchor-type="paragraph" svg:width="4.551cm" svg:height="6.747cm" draw:z-index="0"><draw:image xlink:href="Pictures/10000201000000AC000000FFC489F9F6.png" xlink:type="simple" xlink:show="embed" xlink:actuate="onLoad"/></draw:frame>Las opciones de los ComboListBoxes, son la que estan en la tabla de punto 6 como Opciones disponibles.</text:p>
          </table:table-cell>
        </table:table-row>
      </table:table>
      <text:h text:style-name="P46" text:outline-level="3"><text:span text:style-name="T9">Pantalla 4 — Prompt y Resultados</text:span></text:h>
      <text:p text:style-name="P14">Propósito</text:p>
      <text:p text:style-name="P13">La última pantalla se mostrará el Prompt de acuerdo a las diferentes preferencias, contenidos y texto bíblico seleccionados por el usuario.</text:p>
      <text:p text:style-name="P14">Elementos principales</text:p>
      <text:p text:style-name="P13">1. El texto bíblico a consultar</text:p>
      <text:p text:style-name="P13">2. El Prompt resultante de las opciones seleccionadas</text:p>
      <text:p text:style-name="P13">3. Un botón para comenzar la consulta.</text:p>
      <text:p text:style-name="P13">4. El material, resultado de la consulta y la opción de descarga</text:p>
      <text:p text:style-name="P44">Diseño aproximado de la pantalla</text:p>
      <text:p text:style-name="P45">Lo dejo al criterio y buen hacer de Claude</text:p>
      <text:h text:style-name="P18" text:outline-level="1">9. Requisitos Técnicos</text:h>
      <text:p text:style-name="P15"/>
      <text:h text:style-name="P16" text:outline-level="3">Plataformas objetivo</text:h>
      <text:list xml:id="list33592709" text:continue-list="list33577062" text:style-name="WWNum3">
        <text:list-item>
          <text:p text:style-name="P49">Móvil iOS (Safari)</text:p>
        </text:list-item>
        <text:list-item>
          <text:p text:style-name="P49">Móvil Android (Chrome)</text:p>
        </text:list-item>
        <text:list-item>
          <text:p text:style-name="P49">Tablet</text:p>
        </text:list-item>
        <text:list-item>
          <text:p text:style-name="P49">Escritorio (navegador)</text:p>
        </text:list-item>
      </text:list>
      <text:h text:style-name="P46" text:outline-level="3"><text:span text:style-name="T9">Tipo de aplicación</text:span></text:h>
      <text:p text:style-name="P7">PWA (Progressive Web App) — instalable desde el navegador, sin pasar por tiendas de apps.</text:p>
      <text:h text:style-name="P46" text:outline-level="3"><text:span text:style-name="T9">Tecnología</text:span></text:h>
      <text:list xml:id="list33585246" text:continue-numbering="true" text:style-name="WWNum3">
        <text:list-item>
          <text:p text:style-name="P49">Frontend: React + Vite</text:p>
        </text:list-item>
        <text:list-item>
          <text:p text:style-name="P49">API de plataformas IA: </text:p>
          <text:list>
            <text:list-item>
              <text:p text:style-name="P49">Anthropic Claude (claude-sonnet-4-20250514)</text:p>
            </text:list-item>
            <text:list-item>
              <text:p text:style-name="P49">OpenAI (ChatGPT) </text:p>
            </text:list-item>
            <text:list-item>
              <text:p text:style-name="P49">DeepSeek </text:p>
            </text:list-item>
            <text:list-item>
              <text:p text:style-name="P49">Google Gemini </text:p>
            </text:list-item>
            <text:list-item>
              <text:p text:style-name="P49">API bíblica para el selector Libro/Capítulo/Versículo (bible-api.com) </text:p>
            </text:list-item>
          </text:list>
        </text:list-item>
        <text:list-item>
          <text:p text:style-name="P49">Las API de pago serán por cuenta de la Iglesia.</text:p>
        </text:list-item>
        <text:list-item>
          <text:p text:style-name="P49">Despliegue: Vercel</text:p>
        </text:list-item>
        <text:list-item>
          <text:p text:style-name="P49">Dominio: biblia.jetro.es</text:p>
        </text:list-item>
      </text:list>
      <text:h text:style-name="P46" text:outline-level="3"><text:span text:style-name="T9">Idioma de la interfaz</text:span></text:h>
      <text:p text:style-name="P13">Bilingüe ES/EN</text:p>
      <text:h text:style-name="P46" text:outline-level="3"><text:span text:style-name="T9">¿Requiere login / autenticación?</text:span></text:h>
      <text:p text:style-name="P13">No en esta primera versión, Si después de un test exitoso.</text:p>
      <text:h text:style-name="P46" text:outline-level="3"><text:span text:style-name="T9">¿Se guardan historiales de consultas?</text:span></text:h>
      <text:p text:style-name="P13">Sí en el dispositivo usado</text:p>
      <text:h text:style-name="P46" text:outline-level="3"><text:span text:style-name="T9">Requisitos de rendimiento</text:span></text:h>
      <text:p text:style-name="P13">10 minutos, necesita una red Wifi o de datos</text:p>
      <text:h text:style-name="P18" text:outline-level="1">10. Fuera del Alcance (v1.0)</text:h>
      <text:p text:style-name="P15"/>
      <text:p text:style-name="P11">Funcionalidades que NO se incluirán en la primera versión:</text:p>
      <text:p text:style-name="P8"/>
      <text:p text:style-name="P13">No será necesario una contraseña mientras se este construyendo y probando la App.</text:p>
      <text:p text:style-name="P35"/>
      <text:h text:style-name="P50" text:outline-level="1"><text:span text:style-name="T6">11. Criterios de Aceptación</text:span></text:h>
      <text:p text:style-name="P15"/>
      <text:p text:style-name="P11">¿Cómo sabremos que la app está lista para usarse? La app se considera completa cuando:</text:p>
      <text:p text:style-name="P8"/>
      <text:list xml:id="list33592452" text:continue-numbering="true" text:style-name="WWNum3">
        <text:list-item>
          <text:p text:style-name="P49">El usuario puede ingresar cualquier texto bíblico y recibir material generado</text:p>
        </text:list-item>
        <text:list-item>
          <text:p text:style-name="P49">Las preferencias se pueden configurar y se respetan en el resultado</text:p>
        </text:list-item>
        <text:list-item>
          <text:p text:style-name="P49">Cuando un mínimo del 80% de los pastores de cada iglesia de ACyMVF de su opinión positiva sobre el material que genera la consulta.</text:p>
        </text:list-item>
        <text:list-item>
          <text:p text:style-name="P48"><text:span text:style-name="T5">La app es instalable como PWA en iOS y Android</text:span></text:p>
        </text:list-item>
        <text:list-item>
          <text:p text:style-name="P49">Es accesible desde biblia.jetro.es</text:p>
        </text:list-item>
      </text:list>
      <text:h text:style-name="P50" text:outline-level="1"><text:span text:style-name="T6">12. Preguntas Abiertas</text:span></text:h>
      <text:p text:style-name="P15"/>
      <text:p text:style-name="P11">Aspectos que necesitan decisión antes de poder desarrollar:</text:p>
      <text:p text:style-name="P8"/>
      <text:p text:style-name="P14">P01 — Acceso y seguridad</text:p>
      <text:p text:style-name="P13">Inicialmente solo para miembros de la iglesia. Necesita contraseña, se las proporcionará la iglesia, de forma similar a cuando se da la clave de una Wifi para que sea usada el que la pida.</text:p>
      <text:p text:style-name="P42"><text:span text:style-name="T7">P02 — API Key</text:span></text:p>
      <text:p text:style-name="P13">La iglesia ACyMVF</text:p>
      <text:p text:style-name="P42"><text:span text:style-name="T7">P03 — Nombre de la app</text:span></text:p>
      <text:p text:style-name="P13">Se llamará '<text:span text:style-name="T8">Bereano</text:span>' en el reconocimiento al pueblo de Berea que visitaron Pablo y Silas, quedándose sorprendidos de como los judios de la sinagogas <text:s/>'.. recibieron las palabras con toda solicitud, escudriñando cada día las escrituras...' Hechos 17:10-11</text:p>
      <text:p text:style-name="P42"><text:span text:style-name="T7">P04 — Exportación</text:span></text:p>
      <text:p text:style-name="P13">Es necesario dar la oportunidad que el material generado sea descargado <text:soft-page-break/>para su posterior uso. Se podrá seleccionar el formato de la descarga: Word, PDF o texto.</text:p>
      <text:p text:style-name="P42"><text:span text:style-name="T7">P05 — Historial</text:span></text:p>
      <text:p text:style-name="P13">Si en el dispositivo usado</text:p>
      <text:p text:style-name="P42"><text:span text:style-name="T7">P06 — Multiusuario</text:span></text:p>
      <text:p text:style-name="P13">El Pastor y miembros de la iglesia ACyMVF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" svg:font-family="Arial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name-complex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Arial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706cm" fo:margin-bottom="0.353cm"/>
      <style:text-properties fo:color="#1f3864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529cm" fo:margin-bottom="0.282cm"/>
      <style:text-properties fo:color="#2e74b5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423cm" fo:margin-bottom="0.212cm"/>
      <style:text-properties fo:color="#1f5c8c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2e74b5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1f4d78"/>
    </style:style>
    <style:style style:name="Strong_20_Emphasis" style:display-name="Strong Emphasis" style:family="paragraph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 style:list-style-name=""/>
    <style:style style:name="footnote_20_text" style:display-name="foot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endnote_20_text" style:display-name="end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reference" style:display-name="end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Verdana1" fo:font-size="9pt" style:font-size-asian="9pt" style:font-size-complex="9pt"/>
    </style:style>
    <style:style style:name="MT1" style:family="text">
      <style:text-properties fo:color="#888888" style:font-name-asian="Arial1" style:font-name-complex="Arial1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D — App Estudio Bíblico <text:s/>| <text:s/>Borrador <text:s/>| <text:s/>Página </text:span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n-named</meta:initial-creator>
    <dc:creator>Guido Cafferata</dc:creator>
    <meta:editing-cycles>23</meta:editing-cycles>
    <meta:creation-date>2026-05-20T12:56:43.370</meta:creation-date>
    <dc:date>2026-05-23T13:30:41.47</dc:date>
    <meta:generator>OpenOffice/4.1.15$Win32 OpenOffice.org_project/4115m2$Build-9813</meta:generator>
    <meta:editing-duration>PT11H30M29S</meta:editing-duration>
    <meta:printed-by>Guido Cafferata</meta:printed-by>
    <meta:print-date>2026-05-21T18:06:30.62</meta:print-date>
    <meta:document-statistic meta:table-count="8" meta:image-count="4" meta:object-count="0" meta:page-count="14" meta:paragraph-count="306" meta:word-count="2093" meta:character-count="12882"/>
  </office:meta>
</office:document-meta>
</file>